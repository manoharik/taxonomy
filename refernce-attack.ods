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ptos Narrow" svg:font-family="'Aptos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379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008in solid #00000a"/>
      <style:text-properties fo:color="#000000" style:text-outline="false" style:text-line-through-style="none" style:font-name="Aptos Narrow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a" fo:background-color="#ffffff" style:text-align-source="fix" style:repeat-content="false" fo:border-left="0.0008in solid #00000a" fo:border-right="0.0008in solid #00000a" fo:border-top="none"/>
      <style:paragraph-properties fo:text-align="end"/>
      <style:text-properties fo:color="#000000" style:text-outline="false" style:text-line-through-style="none" style:font-name="Apto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border="0.0008in solid #00000a"/>
      <style:paragraph-properties fo:text-align="end"/>
      <style:text-properties fo:color="#000000" style:text-outline="false" style:text-line-through-style="none" style:font-name="Apto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a" fo:background-color="#ffffff" fo:border-left="none" fo:border-right="0.0008in solid #00000a" fo:border-top="0.0008in solid #00000a"/>
      <style:text-properties fo:color="#000000" style:text-outline="false" style:text-line-through-style="none" style:font-name="Aptos Narrow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a" fo:background-color="#ffffff" fo:border-left="none" fo:border-right="0.0008in solid #00000a" fo:border-top="none"/>
      <style:text-properties style:text-outline="false" style:text-line-through-style="none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a" fo:background-color="#ffffff" fo:border-left="none" fo:border-right="0.0008in solid #00000a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a" fo:background-color="#ffffff" fo:border-left="none" fo:border-right="0.0008in solid #00000a" fo:border-top="0.0008in solid #00000a"/>
      <style:text-properties style:text-outline="false" style:text-line-through-style="none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a" fo:background-color="#ffffff" fo:border-left="none" fo:border-right="0.0008in solid #00000a" fo:border-top="0.0008in solid #00000a"/>
      <style:text-properties fo:color="#000000" style:text-outline="false" style:text-line-through-style="none" style:font-name="Apto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ptos Narrow" fo:font-size="12pt" fo:language="en" fo:country="US" fo:font-style="italic" style:font-name-asian="Times New Roman" style:font-size-asian="12pt" style:font-style-asian="italic" style:font-name-complex="Times New Roman" style:font-size-complex="6.80000019073486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No</text:p>
          </table:table-cell>
          <table:table-cell table:style-name="ce4" office:value-type="string">
            <text:p>Referen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rayanan, A., &amp; Shmatikov, V. (2008). <text:span text:style-name="T1">Robust de-anonymization of large sparse datasets</text:span>. IEEE S&amp;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arbaro, M., &amp; Zeller, T. (2006). <text:span text:style-name="T1">A Face Is Exposed for AOL Searcher No. 4417749</text:span>. NYT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ymrek, M., et al. (2013). <text:span text:style-name="T1">Identifying personal genomes by surname inference</text:span>. Science, 339(6117), 321–3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 Montjoye, Y.-A., et al. (2013). <text:span text:style-name="T1">Unique in the crowd: The privacy bounds of human mobility</text:span>. Nature Scientific Reports, 3, 1376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rlich, Y., et al. (2018). <text:span text:style-name="T1">Identity inference of genomic data using long-range familial searches</text:span>. Science, 362(6415), 690–694.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weeney, L. (2002). <text:span text:style-name="T1">k-anonymity: A model for protecting privacy</text:span>. Int. Journal of Uncertainty, Fuzziness and Knowledge-Based Systems, 10(5), 557–570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ern, A. (2018). <text:span text:style-name="T1">Fitness tracking app Strava gives away location of secret US army bases</text:span>. The Guardian.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arayanan, A., &amp; Shmatikov, V. (2009). <text:span text:style-name="T1">De-anonymizing social networks</text:span>. IEEE S&amp;P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ockar, A. (2014). <text:span text:style-name="T1">Riding with the Stars: Passenger Privacy in the NYC Taxicab Dataset</text:span>. Neustar Research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Zimmer, M. (2008). <text:span text:style-name="T1">“But the data is already public”: On the ethics of research in Facebook</text:span>. Ethics and Information Technology, 12, 313–325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ontjoye, Y.-A. de, Radaelli, L., Singh, V. K., &amp; Pentland, A. (2015). <text:span text:style-name="T1">Unique in the shopping mall: On the reidentifiability of credit card metadata</text:span>. Science, 347(6221), 536–539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Erlich, Y., et al. (2014). <text:span text:style-name="T1">Routes for breaching and protecting genetic privacy</text:span>. Nature Reviews Genetics, 15(6), 409–421.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arayanan, A., &amp; Shmatikov, V. (2009). <text:span text:style-name="T1">Myths and fallacies of personally identifiable information</text:span>. Communications of the ACM, 53(6), 24–26.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iedland, G., &amp; Sommer, R. (2010). <text:span text:style-name="T1">Cybercasing the joint: On the privacy implications of geotagging</text:span>. USENIX HotSec.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ulnane, C., Rubinstein, B. I. P., &amp; Teague, V. (2017). <text:span text:style-name="T1">Health data in an open world</text:span>. arXiv preprint.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dge, M. D., et al. (2017). <text:span text:style-name="T1">Linking records using familial relationships</text:span>. PLoS Genetics, 13(10), e1007024.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Narayanan, A., &amp; Shmatikov, V. (2008). <text:span text:style-name="T1">Robust de-anonymization of large sparse datasets</text:span>. IEEE S&amp;P (same as Netflix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cPherson, R., Shokri, R., &amp; Shmatikov, V. (2016). <text:span text:style-name="T1">Defeating image obfuscation with deep learning</text:span>. arXiv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attani, A., &amp; Ross, A. (2014). <text:span text:style-name="T1">Automatic adaptation of face and voice to improve speaker identification performance</text:span>. ICASSP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ang, W., et al. (2016). <text:span text:style-name="T1">Friend or Foe?: Your Wearable Devices Reveal Your Personal Traits</text:span>. ACM CCS.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6" office:value-type="string">
            <text:p><text:a xlink:href="https://www.usenix.org/conference/usenixsecurity12/technical-sessions/presentation/martinovic">Martinovic, I., Davies, D., Frank, M., Perito, D., Ros, M., &amp; Song, D. (2012). On the feasibility of side-channel attacks with brain-computer interfaces. USENIX Security. [PDF]</text:a>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6" office:value-type="string">
            <text:p><text:a xlink:href="https://doi.org/10.1007/s10676-010-9227-5">Zimmer, M. (2010). “But the data is already public”: On the ethics of research in Facebook. Ethics and Information Technology, 12(4), 313–325. [DOI]</text:a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6" office:value-type="string">
            <text:p><text:a xlink:href="https://doi.org/10.1126/science.1256297">de Montjoye, Y.-A., Radaelli, L., Singh, V. K., &amp; Pentland, A. (2015). Unique in the shopping mall: On the reidentifiability of credit card metadata. Science, 347(6221), 536–539. [DOI]</text:a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6" office:value-type="string">
            <text:p><text:a xlink:href="https://doi.org/10.1109/MSP.2016.35">Lagesse, B. (2016). Security and privacy implications of smart receipt systems. IEEE Security &amp; Privacy, 14(2), 64–67. [DOI]</text:a>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6" office:value-type="string">
            <text:p><text:a xlink:href="https://www.bbc.com/news/technology-46531660">Marder, B. (2018). Flight radar and Instagram posts used to uncover private jet flights. BBC. [Link]</text:a>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6" office:value-type="string">
            <text:p><text:a xlink:href="https://doi.org/10.1145/3178876.3186095">Priedhorsky, R., Gorinsky, S., &amp; Venkataraman, S. (2018). De-anonymizing music listening datasets. WWW '18. [DOI]</text:a>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6" office:value-type="string">
            <text:p><text:a xlink:href="https://doi.org/10.1073/pnas.1218772110">Kosinski, M., Stillwell, D., &amp; Graepel, T. (2013). Private traits and attributes are predictable from digital records of human behavior. PNAS, 110(15), 5802–5805. [DOI]</text:a>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6" office:value-type="string">
            <text:p><text:a xlink:href="https://www.moocdb.org/publications/moocdb_linc_2013.pdf">Veeramachaneni, K., O’Reilly, U.-M., &amp; Taylor, C. (2013). MOOCdb: Developing data standards for MOOC data science. MIT LINC Conference. [PDF]</text:a>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6" office:value-type="string">
            <text:p><text:a xlink:href="https://doi.org/10.1145/1401890.1401902">Ganta, S. R., Kasiviswanathan, S. P., &amp; Smith, A. (2008). Composition attacks and auxiliary information in data privacy. KDD '08. [DOI]</text:a>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6" office:value-type="string">
            <text:p><text:a xlink:href="https://doi.org/10.1109/ICDMW.2010.72">Korolova, A. (2010). Privacy violations using microtargeted ads: A case study. IEEE ICDMW. [DOI]</text:a>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6" office:value-type="string">
            <text:p><text:a xlink:href="https://arxiv.org/abs/1403.0989">Coull, S. E., &amp; Dyer, K. P. (2014). Traffic analysis of encrypted messaging services. arXiv preprint. [arXiv:1403.0989]</text:a>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6" office:value-type="string">
            <text:p><text:a xlink:href="https://ojs.aaai.org/index.php/ICWSM/article/view/14546">Lamba, H., Malik, M. M., &amp; Pfeffer, J. (2013). Analyzing the Use of Personal Style in Public Social Media. ICWSM Poster. [Link]</text:a>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6" office:value-type="string">
            <text:p><text:a xlink:href="https://doi.org/10.1145/1878431.1878446">Molina-Markham, A., Shenoy, P., Fu, K., Cecchet, E., &amp; Irwin, D. (2010). Private memoirs of a smart meter. ACM BuildSys. [DOI]</text:a>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Zern, L., et al. (2020). <text:span text:style-name="T1">Privacy implications of fitness app usage</text:span>. <text:span text:style-name="T1">ACM CHI EA</text:span>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y, N., Shen, S., &amp; Sorber, J. (2017). <text:span text:style-name="T1">BackDoor: Making microphones hear inaudible sounds</text:span>. <text:span text:style-name="T1">ACM CCS</text:span>.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Juels, A., Molnar, D., &amp; Wagner, D. (2005). <text:span text:style-name="T1">Security and privacy issues in e-passports</text:span>. <text:span text:style-name="T1">IEEE SecureComm</text:span>.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aliskan-Islam, A., Harang, R., &amp; Greenstadt, R. (2015). <text:span text:style-name="T1">De-anonymizing programmers via code stylometry</text:span>. <text:span text:style-name="T1">NDSS</text:span>.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ervis, J. (2018). <text:span text:style-name="T1">How safe is police data?</text:span>. <text:span text:style-name="T1">Science</text:span>.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ranzosa, E. A., Huang, K., Meadow, J. F., et al. (2015). <text:span text:style-name="T1">Identifying personal microbiomes using metagenomic codes</text:span>. <text:span text:style-name="T1">PNAS</text:span>, 112(22), E2930–E2938.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onaro, M., et al. (2021). <text:span text:style-name="T1">De-anonymizing users from gait and body motion in avatars</text:span>. <text:span text:style-name="T1">IEEE Transactions on Information Forensics and Security (TIFS)</text:span>.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olove, D. J. (2006). <text:span text:style-name="T1">Identity theft, synthetic identity fraud, and the harms of data insecurity</text:span>. GWU Law Review.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Ko, J., &amp; Oh, J. (2013). <text:span text:style-name="T1">Profiling and de-anonymizing gamers using behavioral data</text:span>. In <text:span text:style-name="T1">CSEDU</text:span>.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ishop, M., &amp; Gates, C. (2008). <text:span text:style-name="T1">The risks of vehicle telematics</text:span>. <text:span text:style-name="T1">IEEE Security &amp; Privacy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Jones, B. (2008). <text:span text:style-name="T1">Reidentification risks in library circulation data</text:span>. <text:span text:style-name="T1">Journal of the American Society for Information Science and Technology (JASIST)</text:span>.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’Keefe, C. M., &amp; Rubin, D. B. (2015). <text:span text:style-name="T1">Privacy for clinical trial participants</text:span>. <text:span text:style-name="T1">Statistical Science</text:span>.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e Montjoye, Y.-A., et al. (2013). <text:span text:style-name="T1">Unique in the crowd: The privacy bounds of human mobility</text:span>. <text:span text:style-name="T1">Scientific Reports</text:span>.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oppersmith, G., Dredze, M., &amp; Harman, C. (2014). <text:span text:style-name="T1">Quantifying mental health signals in Twitter</text:span>. In <text:span text:style-name="T1">ACL Workshop on Computational Linguistics and Clinical Psychology</text:span>.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eng, Y., et al. (2020). <text:span text:style-name="T1">Privacy risks in citizen science platforms</text:span>. <text:span text:style-name="T1">Proceedings on Privacy Enhancing Technologies (PETS)</text:span>.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Electronic Frontier Foundation (EFF). (2005). <text:span text:style-name="T1">Tracking printers</text:span>. Available at: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avlov, D., &amp; Ichise, R. (2007). <text:span text:style-name="T1">Reidentifying authors from thesis databases</text:span>. In <text:span text:style-name="T1">European Conference on Information Retrieval (ECIR)</text:span>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Ohm, P. (2010). <text:span text:style-name="T1">Broken promises of privacy: Responding to the surprising failure of anonymization</text:span>. <text:span text:style-name="T1">UCLA Law Review</text:span>, 57, 1701.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Lampson, B. (2004). <text:span text:style-name="T1">Computer security in the real world</text:span>. <text:span text:style-name="T1">IEEE Computer</text:span>, 37(6), 37–46.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riedland, G., &amp; Sommer, R. (2010). <text:span text:style-name="T1">Cybercasing the joint: On the privacy implications of geotagging</text:span>. <text:span text:style-name="T1">USENIX HotSec</text:span>.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aliskan-Islam, A., Harang, R., &amp; Greenstadt, R. (2015). <text:span text:style-name="T1">De-anonymizing programmers via code stylometry</text:span>. In <text:span text:style-name="T1">NDSS</text:span>.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ertrand, L., et al. (2018). <text:span text:style-name="T1">Artist identification from digital brushstroke styles</text:span>. <text:span text:style-name="T1">ACM Journal on Computing and Cultural Heritage (JOCCH)</text:span>.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e Montjoye, Y.-A., et al. (2015). <text:span text:style-name="T1">Unique in the shopping mall: On the reidentifiability of credit card metadata</text:span>. <text:span text:style-name="T1">Science</text:span>, 347(6221), 536–539.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Cheshire, C., &amp; Cook, D. (2021). <text:span text:style-name="T1">Privacy leakage in video conferencing environments</text:span>. In <text:span text:style-name="T1">CHI Extended Abstracts</text:span>.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Li, C., Raghunathan, A., &amp; Jha, N. K. (2011). <text:span text:style-name="T1">Hijacking an insulin pump: Security attacks and defenses for a diabetes therapy system</text:span>. In <text:span text:style-name="T1">IEEE S&amp;P (Oakland)</text:span>.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rennan, M., &amp; Lo, B. (2013). <text:span text:style-name="T1">Privacy risks in airport metadata</text:span>. In <text:span text:style-name="T1">ACM PETRA</text:span>.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ang, H., Wang, C., &amp; Wu, Y. (2022). <text:span text:style-name="T1">De-anonymizing blockchain users via NFT transaction analysis</text:span>. <text:span text:style-name="T1">arXiv preprint arXiv:2203.13568</text:span>.</text:p>
          </table:table-cell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7" office:value-type="string">
            <text:p>Wang, W., et al. (2016). <text:span text:style-name="T1">Friend or foe?: Your wearable devices reveal your personal traits</text:span>. In <text:span text:style-name="T1">ACM CCS</text:span>.</text:p>
          </table:table-cell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8" office:value-type="string">
            <text:p>German License Plate Data (2013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ptos Narrow" svg:font-family="'Aptos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9">06/09/2026</text:date>, <text:time>12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hari Kelani Bandara</meta:initial-creator>
    <meta:creation-date>2026-06-09T12:47:58.42</meta:creation-date>
    <dc:date>2026-06-09T12:49:08.69</dc:date>
    <dc:creator>Manohari Kelani Bandara</dc:creator>
    <meta:editing-duration>PT1M11S</meta:editing-duration>
    <meta:editing-cycles>1</meta:editing-cycles>
    <meta:document-statistic meta:table-count="3" meta:cell-count="126" meta:object-count="0"/>
    <meta:generator>OpenOffice/4.1.16$Win32 OpenOffice.org_project/4116m3$Build-9816</meta:generator>
  </office:meta>
</office:document-meta>
</file>